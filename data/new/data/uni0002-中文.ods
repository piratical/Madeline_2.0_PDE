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/>
    <style:font-face style:name="AR PL ZenKai Uni" svg:font-family="'AR PL ZenKai Uni'" style:font-pitch="variable"/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AR PL ZenKai Uni" style:font-name-complex="AR PL ZenKai Un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 PL ZenKai Uni" style:font-size-asian="10pt" style:language-asian="none" style:country-asian="none" style:font-style-asian="normal" style:font-weight-asian="normal" style:font-name-complex="AR PL ZenKai Uni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size="10pt" style:font-name-asian="AR PL ZenKai Uni" style:font-name-complex="AR PL ZenKai Uni" style:font-size-complex="10pt"/>
    </style:style>
    <style:style style:name="ce4" style:family="table-cell" style:parent-style-name="Default">
      <style:text-properties style:font-name-asian="AR PL ZenKai Uni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4" table:default-cell-style-name="ce1"/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Gende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ffected</text:p>
          </table:table-cell>
          <table:table-cell office:value-type="string">
            <text:p>DZTwin</text:p>
          </table:table-cell>
          <table:table-cell office:value-type="string">
            <text:p>MZTwin</text:p>
          </table:table-cell>
          <table:table-cell table:style-name="ce1" office:value-type="string">
            <text:p>姓</text:p>
          </table:table-cell>
          <table:table-cell office:value-type="string">
            <text:p>名字</text:p>
          </table:table-cell>
          <table:table-cell office:value-type="string">
            <text:p>村</text:p>
          </table:table-cell>
          <table:table-cell office:value-type="string">
            <text:p>鄉</text:p>
          </table:table-cell>
          <table:table-cell office:value-type="string">
            <text:p>省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1</text:p>
          </table:table-cell>
          <table:table-cell office:value-type="string">
            <text:p>男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4" office:value-type="string">
            <text:p>祿山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2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虞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3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吴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4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滑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5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马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6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山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7</text:p>
          </table:table-cell>
          <table:table-cell office:value-type="string">
            <text:p>女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8</text:p>
          </table:table-cell>
          <table:table-cell office:value-type="string">
            <text:p>男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9</text:p>
          </table:table-cell>
          <table:table-cell office:value-type="string">
            <text:p>男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0</text:p>
          </table:table-cell>
          <table:table-cell office:value-type="string">
            <text:p>女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1</text:p>
          </table:table-cell>
          <table:table-cell office:value-type="string">
            <text:p>男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2</text:p>
          </table:table-cell>
          <table:table-cell office:value-type="string">
            <text:p>女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马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3</text:p>
          </table:table-cell>
          <table:table-cell office:value-type="string">
            <text:p>女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马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4</text:p>
          </table:table-cell>
          <table:table-cell office:value-type="string">
            <text:p>男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马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5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晁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6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丁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7</text:p>
          </table:table-cell>
          <table:table-cell office:value-type="string">
            <text:p>女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丁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8</text:p>
          </table:table-cell>
          <table:table-cell office:value-type="string">
            <text:p>男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丁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9</text:p>
          </table:table-cell>
          <table:table-cell office:value-type="string">
            <text:p>女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丁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0</text:p>
          </table:table-cell>
          <table:table-cell office:value-type="string">
            <text:p>女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1</text:p>
          </table:table-cell>
          <table:table-cell office:value-type="string">
            <text:p>男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2</text:p>
          </table:table-cell>
          <table:table-cell office:value-type="string">
            <text:p>男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3</text:p>
          </table:table-cell>
          <table:table-cell office:value-type="string">
            <text:p>女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4</text:p>
          </table:table-cell>
          <table:table-cell office:value-type="string">
            <text:p>男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5</text:p>
          </table:table-cell>
          <table:table-cell office:value-type="string">
            <text:p>女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6</text:p>
          </table:table-cell>
          <table:table-cell office:value-type="string">
            <text:p>女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7</text:p>
          </table:table-cell>
          <table:table-cell office:value-type="string">
            <text:p>男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8</text:p>
          </table:table-cell>
          <table:table-cell office:value-type="string">
            <text:p>女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黄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9</text:p>
          </table:table-cell>
          <table:table-cell office:value-type="string">
            <text:p>女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黄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0</text:p>
          </table:table-cell>
          <table:table-cell office:value-type="string">
            <text:p>女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黄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3</text:p>
          </table:table-cell>
          <table:table-cell office:value-type="string">
            <text:p>女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4</text:p>
          </table:table-cell>
          <table:table-cell office:value-type="string">
            <text:p>女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周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5</text:p>
          </table:table-cell>
          <table:table-cell office:value-type="string">
            <text:p>男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东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6</text:p>
          </table:table-cell>
          <table:table-cell office:value-type="string">
            <text:p>女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马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7</text:p>
          </table:table-cell>
          <table:table-cell office:value-type="string">
            <text:p>男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马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8</text:p>
          </table:table-cell>
          <table:table-cell office:value-type="string">
            <text:p>女</text:p>
          </table:table-cell>
          <table:table-cell office:value-type="string">
            <text:p>Indv0018</text:p>
          </table:table-cell>
          <table:table-cell office:value-type="string">
            <text:p>Indv0034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丁</text:p>
          </table:table-cell>
          <table:table-cell table:number-columns-repeated="4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9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黄</text:p>
          </table:table-cell>
          <table:table-cell table:number-columns-repeated="4" office:value-type="string">
            <text:p>.</text:p>
          </table:table-cell>
        </table:table-row>
        <table:table-row table:style-name="ro1" table:number-rows-repeated="6549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/>
    <style:font-face style:name="AR PL ZenKai Uni" svg:font-family="'AR PL ZenKai Uni'" style:font-pitch="variable"/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8">08/18/2006</text:date>, <text:time>15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Edward Trager</meta:initial-creator>
    <meta:creation-date>2006-08-15T12:17:33</meta:creation-date>
    <dc:creator>Edward Trager</dc:creator>
    <dc:date>2006-08-18T15:55:03</dc:date>
    <dc:language>en-US</dc:language>
    <meta:editing-cycles>14</meta:editing-cycles>
    <meta:editing-duration>PT6H17M7S</meta:editing-duration>
    <meta:user-defined meta:name="Info 1"/>
    <meta:user-defined meta:name="Info 2"/>
    <meta:user-defined meta:name="Info 3"/>
    <meta:user-defined meta:name="Info 4"/>
    <meta:document-statistic meta:table-count="3" meta:cell-count="494"/>
  </office:meta>
</office:document-meta>
</file>